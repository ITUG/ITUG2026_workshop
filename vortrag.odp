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lue_5f_Curve1-outline1">
      <style:graphic-properties draw:textarea-horizontal-align="justify" fo:min-height="0.101cm" loext:decorative="false"/>
      <style:paragraph-properties style:writing-mode="lr-tb"/>
    </style:style>
    <style:style style:name="pr7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left="0cm" fo:margin-right="0cm" fo:margin-top="0.42cm" fo:margin-bottom="0.35cm" fo:text-indent="0cm"/>
    </style:style>
    <style:style style:name="P5" style:family="paragraph">
      <style:paragraph-properties fo:margin-left="0cm" fo:margin-right="0cm" fo:margin-top="0.42cm" fo:margin-bottom="0.35cm" fo:text-align="justify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Liberation Sans" style:font-size-asian="22pt" style:font-style-asian="normal" style:font-weight-asian="normal" style:font-name-complex="Liberation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22pt" style:font-name-asian="Liberation Sans" style:font-size-asian="22pt" style:font-name-complex="Liberation Sans" style:font-size-complex="22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ans" style:font-size-asian="21pt" style:font-style-asian="normal" style:font-weight-asian="normal" style:font-name-complex="Liberation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Liberation Sans" style:font-size-asian="20pt" style:font-style-asian="normal" style:font-weight-asian="normal" style:font-name-complex="Liberation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8cm" svg:height="3cm" svg:x="0cm" svg:y="4.5cm" presentation:class="title" presentation:user-transformed="true">
          <draw:text-box>
            <text:p>Einführung in TUSCRIPT<text:line-break/>Teil 1: Datentypen und Datenstrukturen</text:p>
          </draw:text-box>
        </draw:frame>
        <draw:frame presentation:style-name="pr1" draw:layer="layout" svg:width="28cm" svg:height="3cm" svg:x="0cm" svg:y="9cm" presentation:class="title" presentation:user-transformed="true">
          <draw:text-box>
            <text:p><text:span text:style-name="T1">Christian Sonder</text:span><text:span text:style-name="T1"><text:line-break/></text:span><text:span text:style-name="T1">TUSTEP-Workshop Neustadt 2026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Übersich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Einfache Variablen</text:p>
              </text:list-item>
              <text:list-item>
                <text:p>Sternvariablen</text:p>
              </text:list-item>
              <text:list-item>
                <text:p>Tabellen</text:p>
              </text:list-item>
              <text:list-item>
                <text:p>Zeichen- und Stringgruppen</text:p>
              </text:list-item>
              <text:list-item>
                <text:p text:style-name="P2">Stapelspeicher (Stacks)</text:p>
              </text:list-item>
              <text:list-item>
                <text:p>Wörterbücher (Dictionarie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1) Einfache Variable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3">
              <text:list-item>
                <text:p text:style-name="P3"><text:span text:style-name="T2">Eine Variable ist ein benannter Speicherplatz in einem Programm, in dem ein Wert abgelegt und später wiederverwendet oder verändert werden kann.</text:span></text:p>
              </text:list-item>
              <text:list-item>
                <text:p text:style-name="P3"><text:span text:style-name="T2">Einer Variablen wird ein Wert mit dem Schlüsselwort SET zugewiesen:</text:span></text:p>
                <text:p text:style-name="P3"><text:span text:style-name="T2">SET name_der_variable = wert</text:span></text:p>
              </text:list-item>
              <text:list-item>
                <text:p text:style-name="P3"><text:span text:style-name="T2">Beispiele: </text:span></text:p>
                <text:p text:style-name="P3"><text:span text:style-name="T2">SET i = 1</text:span></text:p>
                <text:p text:style-name="P4"><text:span text:style-name="T3">SET name = </text:span><text:span text:style-name="T4">"</text:span><text:span text:style-name="T3">Christian</text:span><text:span text:style-name="T5">"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1) Einfache Variabl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2">Der Inhalt einer Variable kann mit dem Schlüsselwort PRINT ausgegeben werden.</text:span></text:p>
              </text:list-item>
              <text:list-item>
                <text:p text:style-name="P3"><text:span text:style-name="T2">Beispiel:</text:span></text:p>
                <text:p text:style-name="P5"><text:span text:style-name="T3">SET name = </text:span><text:span text:style-name="T4">"</text:span><text:span text:style-name="T3">Christian</text:span><text:span text:style-name="T5">"</text:span></text:p>
                <text:p text:style-name="P5"><text:span text:style-name="T5">PRINT name</text:span></text:p>
              </text:list-item>
              <text:list-item>
                <text:p text:style-name="P5"><text:span text:style-name="T5">Eine Variable kann mit UNSET wieder gelöscht werden</text:span></text:p>
                <text:p text:style-name="P5"><text:span text:style-name="T5">UNSET name</text:span></text:p>
              </text:list-item>
            </text:list>
          </draw:text-box>
        </draw:frame>
        <draw:frame draw:style-name="gr2" draw:text-style-name="P6" draw:layer="layout" svg:width="24cm" svg:height="0.962cm" svg:x="2cm" svg:y="14.5cm">
          <draw:text-box>
            <text:p>Vgl. in Segmentdatei vortrag die Segmente variable_1 und variable_2.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1) Einfache Variabl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2">Eine Variable kann mit dem Wert einer TUSCRIPT-Funktion belegt werden.</text:span></text:p>
              </text:list-item>
              <text:list-item>
                <text:p text:style-name="P3"><text:span text:style-name="T2">Beispiel:</text:span></text:p>
                <text:p text:style-name="P5"><text:span text:style-name="T5">SET datum = DATE(0)</text:span></text:p>
                <text:p text:style-name="P5"><text:span text:style-name="T4">PRINT "Heute ist {datum}</text:span><text:span text:style-name="T5">".</text:span></text:p>
              </text:list-item>
              <text:list-item>
                <text:p text:style-name="P5"><text:span text:style-name="T5">Der Wert einer Variablen kann im Laufe des Programms überschrieben werden:</text:span></text:p>
                <text:p text:style-name="P5"><text:span text:style-name="T5">SET datum = DATE(1)</text:span></text:p>
                <text:p text:style-name="P5"><text:span text:style-name="T4">PRINT "Heute haben wir den {datum}."</text:span></text:p>
              </text:list-item>
            </text:list>
          </draw:text-box>
        </draw:frame>
        <draw:frame draw:style-name="gr3" draw:text-style-name="P7" draw:layer="layout" svg:width="20.235cm" svg:height="0.961cm" svg:x="2cm" svg:y="14.5cm">
          <draw:text-box>
            <text:p>Vgl. in Segmentdatei vortrag die Segmente variable_3 und variable_4.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1) Einfache Variabl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2">Eine Variable kann mit dem Wert einer anderen Variable belegt werden oder mit dem Ergebnis einer Berechnung.</text:span></text:p>
              </text:list-item>
              <text:list-item>
                <text:p text:style-name="P3"><text:span text:style-name="T2">Beispiel:</text:span></text:p>
                <text:p text:style-name="P5"><text:span text:style-name="T5">SET start = 1000</text:span></text:p>
                <text:p text:style-name="P5"><text:span text:style-name="T2">SET zinssatz = 5</text:span></text:p>
                <text:p text:style-name="P5"><text:span text:style-name="T2">SET ende = start * zinssatz / 100 + start</text:span></text:p>
                <text:p text:style-name="P5"><text:span text:style-name="T2">PRINT ende</text:span></text:p>
                <text:p text:style-name="P5"><text:span text:style-name="T4"/></text:p>
              </text:list-item>
            </text:list>
          </draw:text-box>
        </draw:frame>
        <draw:frame draw:style-name="gr3" draw:text-style-name="P7" draw:layer="layout" svg:width="20.235cm" svg:height="0.961cm" svg:x="2cm" svg:y="14.5cm">
          <draw:text-box>
            <text:p>Vgl. in Segmentdatei vortrag das Segment variable_5.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2) Sternvariabl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2">Eine Sternvariable kann mit bis zu ca. 67 Millionen Werten belegt werden. Die Ausgabe erfolgt nicht mit PRINT, sondern mit TRACE.</text:span></text:p>
              </text:list-item>
              <text:list-item>
                <text:p text:style-name="P3"><text:span text:style-name="T2">Definition mit Stern, Belegung mit DATA:</text:span></text:p>
                <text:p text:style-name="P5"><text:span text:style-name="T5">SET sternvar = *</text:span></text:p>
                <text:p text:style-name="P5"><text:span text:style-name="T2">DATA zeile 1</text:span></text:p>
                <text:p text:style-name="P5"><text:span text:style-name="T2">DATA zeile 2</text:span></text:p>
                <text:p text:style-name="P5"><text:span text:style-name="T2">DATA zeile 3</text:span></text:p>
                <text:p text:style-name="P5"><text:span text:style-name="T2">TRACE * sternvar</text:span></text:p>
                <text:p text:style-name="P5"><text:span text:style-name="T4"/></text:p>
              </text:list-item>
            </text:list>
          </draw:text-box>
        </draw:frame>
        <draw:frame draw:style-name="gr3" draw:text-style-name="P7" draw:layer="layout" svg:width="20.235cm" svg:height="0.961cm" svg:x="2cm" svg:y="14.5cm">
          <draw:text-box>
            <text:p>Vgl. in Segmentdatei vortrag die Segmente sternvariable_1 und 3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2) Sternvariabl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2">Eine Sternvariable kann auch mit Funktionswerten belegt werden.</text:span></text:p>
              </text:list-item>
              <text:list-item>
                <text:p text:style-name="P3"><text:span text:style-name="T2">Die Anzahl der Zeilen der Sternvariable kann mit SIZE() abgefragt werden.</text:span></text:p>
              </text:list-item>
              <text:list-item>
                <text:p text:style-name="P3"><text:span text:style-name="T2">Beispiel, Einlesen einer TUSTEP-Datei in eine Sternvariable:</text:span></text:p>
                <text:p text:style-name="P4"><text:span text:style-name="T3">SET sternvar = FILE(</text:span><text:span text:style-name="T4">"dateiname</text:span><text:span text:style-name="T5">")</text:span></text:p>
                <text:p text:style-name="P3"><text:span text:style-name="T2">SET anzahl = SIZE(sternvar)</text:span></text:p>
                <text:p text:style-name="P3"><text:span text:style-name="T2">PRINT </text:span><text:span text:style-name="T5">"Die Sternvariable hat {anzahl} Zeilen."</text:span></text:p>
                <text:p text:style-name="P5"><text:span text:style-name="T4"/></text:p>
              </text:list-item>
            </text:list>
          </draw:text-box>
        </draw:frame>
        <draw:frame draw:style-name="gr3" draw:text-style-name="P7" draw:layer="layout" svg:width="20.235cm" svg:height="0.961cm" svg:x="2cm" svg:y="14.5cm">
          <draw:text-box>
            <text:p>Vgl. in Segmentdatei vortrag das Segment sternvariable_2.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2) Sternvariabl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2">Es gibt zahlreiche nützliche Funktionen für Sternvariablen, hier eine kleine, subjektive Auswahl:</text:span></text:p>
                <text:p text:style-name="P3"><text:span text:style-name="T2">SIZE(var) =&gt; Anzahl der Zeilen</text:span></text:p>
                <text:p text:style-name="P3"><text:span text:style-name="T2">APPEND(var, zeile) =&gt; Eine Zeile am Ende hinzufügen</text:span></text:p>
                <text:p text:style-name="P3"><text:span text:style-name="T2">SELECT(var, auswahl) =&gt; Bestimmte Zeilen auswählen</text:span></text:p>
                <text:p text:style-name="P3"><text:span text:style-name="T2">REPLACE(var, auswahl) =&gt; Bestimmte Zeilen austauschen</text:span></text:p>
                <text:p text:style-name="P3"><text:span text:style-name="T2">REMOVE (var, auswahl) =&gt; Bestimmte Zeilen entfernen</text:span></text:p>
                <text:p text:style-name="P3"><text:span text:style-name="T2">REVERSE(var) =&gt; Reihenfolge der Zeilen umkehren</text:span></text:p>
                <text:p text:style-name="P3"><text:span text:style-name="T2">SORT(var) =&gt; Sternvariable sortieren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2) Sternvariabl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2">Iterieren über Sternvariablen ist sehr schön mit Schleifen möglich.</text:span></text:p>
              </text:list-item>
              <text:list-item>
                <text:p text:style-name="P3"><text:span text:style-name="T2">Beispiel:</text:span></text:p>
                <text:p text:style-name="P3"><text:span text:style-name="T3">sternvar = FILE(</text:span><text:span text:style-name="T4">"</text:span><text:span text:style-name="T3">dateiname</text:span><text:span text:style-name="T5">"</text:span><text:span text:style-name="T2">)</text:span></text:p>
                <text:p text:style-name="P3"><text:span text:style-name="T2">LOOP/CLEAR zeile = sternvar</text:span></text:p>
                <text:p text:style-name="P4"><text:span text:style-name="T3"><text:s text:c="3"/>zeile = EXCHANGE(zeile, </text:span><text:span text:style-name="T4">"|1|2|")</text:span></text:p>
                <text:p text:style-name="P4"><text:span text:style-name="T4"><text:s text:c="3"/>sternvar = APPEND(sternvar, zeile)</text:span></text:p>
                <text:p text:style-name="P4"><text:span text:style-name="T4">ENDLOOP</text:span></text:p>
              </text:list-item>
            </text:list>
          </draw:text-box>
        </draw:frame>
        <draw:frame draw:style-name="gr3" draw:text-style-name="P8" draw:layer="layout" svg:width="20.235cm" svg:height="0.961cm" svg:x="2cm" svg:y="14.5cm">
          <draw:text-box>
            <text:p><text:span text:style-name="T6">Vgl. in Segmentdatei vortrag das Segment sternvariable_4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3) Tabell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Es gibt in TUSCRIPT drei Arten von Tabellen, die definiert werden können:</text:span></text:p>
                <text:list>
                  <text:list-item>
                    <text:p><text:span text:style-name="T4">Suchtabellen (S_TABLE)</text:span></text:p>
                  </text:list-item>
                  <text:list-item>
                    <text:p><text:span text:style-name="T4">Recherchiertabellen (R_TABLE)</text:span></text:p>
                  </text:list-item>
                  <text:list-item>
                    <text:p><text:span text:style-name="T4">Austauschtabellen (X_TABLE)</text:span></text:p>
                  </text:list-item>
                </text:list>
              </text:list-item>
              <text:list-item>
                <text:p><text:span text:style-name="T4">Aus Zeitgründen besprechen wir nur Such- und Austauschtabell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3) Tabell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Eine Suchtabelle wird mit BUILD S_TABLE erstellt und mit RELEASE S_TABLE wieder freigegeben.</text:span></text:p>
              </text:list-item>
              <text:list-item>
                <text:p text:style-name="P3"><text:span text:style-name="T4">Beispiel:</text:span></text:p>
                <text:p text:style-name="P3"><text:span text:style-name="T4">BUILD S_TABLE s1 = "|1|2|"</text:span></text:p>
                <text:p text:style-name="P3"><text:span text:style-name="T4">LOOP zeile = sternvar</text:span></text:p>
                <text:p text:style-name="P3"><text:span text:style-name="T4"><text:s text:c="3"/>IF (zeile .CT. s1) PRINT "Treffer"</text:span></text:p>
                <text:p text:style-name="P3"><text:span text:style-name="T4">ENDLOOP </text:span></text:p>
                <text:p text:style-name="P3"><text:span text:style-name="T4">RELEASE S_TABLE s1 </text:span><text:span text:style-name="T7"><text:s text:c="2"/></text:span></text:p>
              </text:list-item>
              <text:list-item>
                <text:p text:style-name="P3"><text:span text:style-name="T8">Die </text:span><text:span text:style-name="T4">Syntax</text:span><text:span text:style-name="T8"> entspricht den bekannten Zeigeanweisungen im Editor.</text:span></text:p>
              </text:list-item>
            </text:list>
          </draw:text-box>
        </draw:frame>
        <draw:frame draw:style-name="gr3" draw:text-style-name="P8" draw:layer="layout" svg:width="20.235cm" svg:height="0.961cm" svg:x="2cm" svg:y="14.5cm">
          <draw:text-box>
            <text:p><text:span text:style-name="T6">Vgl. in Segmentdatei vortrag das Segment suchtab_1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3) Tabell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Eine Austauschtabelle wird mit BUILD X_TABLE erstellt und mit RELEASE X_TABLE wieder freigegeben.</text:span></text:p>
              </text:list-item>
              <text:list-item>
                <text:p text:style-name="P3"><text:span text:style-name="T4">Beispiel:</text:span></text:p>
                <text:p text:style-name="P3"><text:span text:style-name="T4">BUILD X_TABLE x1 = "|1|2|"</text:span></text:p>
                <text:p text:style-name="P3"><text:span text:style-name="T4">LOOP/CLEAR zeile = sternvar</text:span></text:p>
                <text:p text:style-name="P3"><text:span text:style-name="T4"><text:s text:c="3"/>zeile = EXCHANGE(zeile, x1)</text:span></text:p>
                <text:p text:style-name="P3"><text:span text:style-name="T4"><text:s text:c="3"/>sternvar = APPEND(sternvar, zeile)</text:span></text:p>
                <text:p text:style-name="P3"><text:span text:style-name="T4">ENDLOOP </text:span></text:p>
                <text:p text:style-name="P3"><text:span text:style-name="T4">RELEASE X_TABLE x1 </text:span><text:span text:style-name="T7"><text:s text:c="2"/></text:span></text:p>
              </text:list-item>
            </text:list>
          </draw:text-box>
        </draw:frame>
        <draw:frame draw:style-name="gr3" draw:text-style-name="P8" draw:layer="layout" svg:width="20.235cm" svg:height="0.961cm" svg:x="2cm" svg:y="14.5cm">
          <draw:text-box>
            <text:p><text:span text:style-name="T6">Vgl. in Segmentdatei vortrag das Segment xtab_1.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4) Zeichen- und Stringgrupp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draw:style-name="gr3" draw:text-style-name="P8" draw:layer="layout" svg:width="20.5cm" svg:height="0.961cm" svg:x="2cm" svg:y="14.5cm">
          <draw:text-box>
            <text:p><text:span text:style-name="T6">Vgl. in Segmentdatei vortrag die Segmente s_group_1 und c_group_1.</text:span>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Es gibt in TUSCRIPT Zeichengruppen (C_GROUP) und Stringgruppen (S_GROUP). Sie werden wie Tabellen mit BUILD und RELEASE erstellt bzw. wieder freigegeben.</text:span></text:p>
              </text:list-item>
              <text:list-item>
                <text:p text:style-name="P3"><text:span text:style-name="T4">Beispiel:</text:span></text:p>
                <text:p text:style-name="P4"><text:span text:style-name="T4">BUILD C_GROUP c1 = "|a|e|i|o|u|y|ä|ö|ü|"</text:span></text:p>
                <text:p text:style-name="P4"><text:span text:style-name="T4">BUILD S_GROUP s1 = "|heit|keit|ung|lich|bar|"</text:span></text:p>
                <text:p text:style-name="P4"><text:span text:style-name="T4">RELEASE C_GROUP c1</text:span></text:p>
                <text:p text:style-name="P4"><text:span text:style-name="T4">RELEASE S_GROUP s1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ie Segmente s_group_1 und c_group_1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4) Zeichen- und Stringgruppe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Zeichen- und Stringgruppen werden in Tabellen verwendet.</text:span></text:p>
              </text:list-item>
              <text:list-item>
                <text:p text:style-name="P3"><text:span text:style-name="T4">Beispiel:</text:span></text:p>
                <text:p text:style-name="P4"><text:span text:style-name="T8">BUILD S_GROUP s1 = "|heit|lich|bar|keit|"</text:span></text:p>
                <text:p text:style-name="P4"><text:span text:style-name="T8">BUILD X_TABLE x1 = "|{00}{s:s1}|ung|"</text:span></text:p>
                <text:p text:style-name="P4"><text:span text:style-name="T8">LOOP/CLEAR zeile = sternvar</text:span></text:p>
                <text:p text:style-name="P4"><text:span text:style-name="T8"><text:s text:c="3"/>zeile = EXCHANGE(zeile, x1)</text:span></text:p>
                <text:p text:style-name="P4"><text:span text:style-name="T8">ENDLOOP</text:span></text:p>
                <text:p text:style-name="P4"><text:span text:style-name="T8">RELEASE S_GROUP s1</text:span></text:p>
                <text:p text:style-name="P4"><text:span text:style-name="T8">RELEASE X_TABLE x1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ie Segmente stack_1 und stack_2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5) Stapelspeicher (Stack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Stapelspeicher dienen als Ablage für Inhalte von Variablen.</text:span></text:p>
              </text:list-item>
              <text:list-item>
                <text:p text:style-name="P3"><text:span text:style-name="T4">TUSTEP bietet folgende Operationen für Stacks an:</text:span></text:p>
                <text:p text:style-name="P3"><text:span text:style-name="T9">STACK name CREATE anzahl (richtet einen Stack ein)</text:span></text:p>
                <text:p text:style-name="P3"><text:span text:style-name="T9">STACK name PUSH variable (legt den Wert einer Variable auf dem Stack ab)</text:span></text:p>
                <text:p text:style-name="P3"><text:span text:style-name="T9">STACK name SPLIT sternvar (legt alle Werte der Sternvariable ab)</text:span></text:p>
                <text:p text:style-name="P3"><text:span text:style-name="T9">STACK name SIZE sternvar (gibt die Anzahl der Werte im Stack)</text:span></text:p>
                <text:p text:style-name="P3"><text:span text:style-name="T9">STACK name CLEAR (leert die Werte aus dem Stack)</text:span></text:p>
                <text:p text:style-name="P3"><text:span text:style-name="T9">STACK name DELETE (löscht den Stack)</text:span></text:p>
                <text:p text:style-name="P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as Segment stack_1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5) Stapelspeicher (Stack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Stapelspeicher dienen als Ablage für Inhalte von Variablen.</text:span></text:p>
              </text:list-item>
              <text:list-item>
                <text:p text:style-name="P3"><text:span text:style-name="T4">Beispiel:</text:span></text:p>
                <text:p text:style-name="P3"><text:span text:style-name="T9">STACK stapel CREATE 10</text:span></text:p>
                <text:p text:style-name="P3"><text:span text:style-name="T9">STACK stapel PUSH "1"</text:span></text:p>
                <text:p text:style-name="P3"><text:span text:style-name="T9">STACK stapel PUSH "2"</text:span></text:p>
                <text:p text:style-name="P3"><text:span text:style-name="T9">STACK stapel PUSH "3"</text:span></text:p>
                <text:p text:style-name="P3"><text:span text:style-name="T9">STACK stapel SIZE anzahl</text:span></text:p>
                <text:p text:style-name="P3"><text:span text:style-name="T9">PRINT "Auf dem Stack stapel liegen {anzahl} Werte."</text:span></text:p>
                <text:p text:style-name="P3"><text:span text:style-name="T9">STACK stapel DELETE <text:s text:c="8"/></text:span></text:p>
                <text:p text:style-name="P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ie Segmente stack_3 und stack_4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5) Stapelspeicher (Stack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Stapelspeicher dienen als Ablage für Inhalte von Variablen.</text:span></text:p>
              </text:list-item>
              <text:list-item>
                <text:p text:style-name="P3"><text:span text:style-name="T4">TUSTEP bietet folgende Operationen für Stacks an:</text:span></text:p>
                <text:p text:style-name="P3"><text:span text:style-name="T9">STACK name POP variable (nimmt den obersten Wert vom Stapel)</text:span></text:p>
                <text:p text:style-name="P3"><text:span text:style-name="T9">STACK name LIFO variable (synonym zu pop: Last In – First Out)</text:span></text:p>
                <text:p text:style-name="P3"><text:span text:style-name="T9">STACK name FIFO variable (nimmt den untersten Wert, First In – First out)</text:span></text:p>
                <text:p text:style-name="P3"><text:span text:style-name="T9">STACK name PEEK variable (liest den oberstern Wert)</text:span></text:p>
                <text:p text:style-name="P3"><text:span text:style-name="T9">STACK name LOOK variable (liest den untersten Wert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as Segment stack_3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5) Stapelspeicher (Stack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Stapelspeicher dienen als Ablage für Inhalte von Variablen.</text:span></text:p>
              </text:list-item>
              <text:list-item>
                <text:p text:style-name="P3"><text:span text:style-name="T4">Beispiel:</text:span></text:p>
                <text:p text:style-name="P3"><text:span text:style-name="T9">sternvar = *</text:span></text:p>
                <text:p text:style-name="P3"><text:span text:style-name="T9">DATA 1</text:span></text:p>
                <text:p text:style-name="P3"><text:span text:style-name="T9">DATA 2</text:span></text:p>
                <text:p text:style-name="P3"><text:span text:style-name="T9">DATA 3</text:span></text:p>
                <text:p text:style-name="P3"><text:span text:style-name="T9">STACK stapel CREATE 10</text:span></text:p>
                <text:p text:style-name="P3"><text:span text:style-name="T9">STACK stapel SPLIT sternva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as Segment stack_3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5) Stapelspeicher (Stack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Stapelspeicher dienen als Ablage für Inhalte von Variablen.</text:span></text:p>
              </text:list-item>
              <text:list-item>
                <text:p text:style-name="P3"><text:span text:style-name="T4">Beispiel:</text:span></text:p>
                <text:p text:style-name="P3"><text:span text:style-name="T9">STACK stapel LIFO oben</text:span><text:span text:style-name="T9"><text:tab/></text:span><text:span text:style-name="T9">=&gt; Liefert den Wert „3“</text:span></text:p>
                <text:p text:style-name="P4"><text:span text:style-name="T9">STACK stapel FIFO unten</text:span><text:span text:style-name="T9"><text:tab/></text:span><text:span text:style-name="T9">=&gt; Liefert den Wert „1“</text:span></text:p>
                <text:p text:style-name="P4"><text:span text:style-name="T9">STACK stapel SIZE anzahl =&gt; Liefert nur den Wert „1“</text:span></text:p>
                <text:p text:style-name="P4"><text:span text:style-name="T9">STACK stapel DELETE</text:span></text:p>
                <text:p text:style-name="P4"><text:span text:style-name="T9">LIFO (POP) und FIFO verändern den Stapel!</text:span></text:p>
                <text:p text:style-name="P4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as Segment stack_4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5) Stapelspeicher (Stack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Stapelspeicher dienen als Ablage für Inhalte von Variablen.</text:span></text:p>
              </text:list-item>
              <text:list-item>
                <text:p text:style-name="P3"><text:span text:style-name="T4">Beispiel:</text:span></text:p>
                <text:p text:style-name="P3"><text:span text:style-name="T9">STACK stapel PEEK oben</text:span><text:span text:style-name="T9"><text:tab/></text:span><text:span text:style-name="T9">=&gt; Liefert den Wert „3“</text:span></text:p>
                <text:p text:style-name="P4"><text:span text:style-name="T9">STACK stapel LOOK unten =&gt; Liefert den Wert „1“</text:span></text:p>
                <text:p text:style-name="P4"><text:span text:style-name="T9">STACK stapel SIZE anzahl =&gt; Liefertn den Wert „3“</text:span></text:p>
                <text:p text:style-name="P4"><text:span text:style-name="T9">PEEK und LOOK verändern den Stapel nicht.</text:span></text:p>
                <text:p text:style-name="P4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as Segment dict_1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6) Wörterbücher (Dictionarie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TUSCRIPT bietet Wörterbücher an, die zu einem eindeutigen Schlüsselwort (key) bis zu zwei Werte abspeichern können.</text:span></text:p>
              </text:list-item>
              <text:list-item>
                <text:p text:style-name="P3"><text:span text:style-name="T4">Unter anderem sind folgende Operationen möglich:</text:span></text:p>
                <text:p text:style-name="P3"><text:span text:style-name="T4">DICT name CREATE anzahl (Wörterbuch mit anzahl Einträgen anlegen)</text:span></text:p>
                <text:p text:style-name="P4"><text:span text:style-name="T4">DICT name ADD key, num, count, wert1, wert2 (einen Eintrag mit bis zu zwei Werten hinzufügen)</text:span></text:p>
                <text:p text:style-name="P3"><text:span text:style-name="T4">DICT name SIZE anzahl (gibt die Anzahl der Einträge im Wörterbuch)</text:span></text:p>
                <text:p text:style-name="P3"><text:span text:style-name="T4">DICT name CLEAR (löscht die Einträge im Wörterbuch)</text:span></text:p>
                <text:p text:style-name="P3"><text:span text:style-name="T4">DICT name DELETE (löscht das Wörterbuch)</text:span></text:p>
                <text:p text:style-name="P4"><text:span text:style-name="T4"/></text:p>
                <text:p text:style-name="P4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as Segment dict_1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6) Wörterbücher (Dictionarie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TUSCRIPT bietet Wörterbücher an, die zu einem eindeutigen Schlüsselwort (key) bis zu zwei Werte abspeichern können.</text:span></text:p>
              </text:list-item>
              <text:list-item>
                <text:p text:style-name="P3"><text:span text:style-name="T4">Beispiel:</text:span></text:p>
                <text:p text:style-name="P3"><text:span text:style-name="T4">DICT wb CREATE 1000</text:span></text:p>
                <text:p text:style-name="P4"><text:span text:style-name="T4">DICT Wb ADD "test", num, count, "wert 1", "wert2"</text:span></text:p>
                <text:p text:style-name="P3"><text:span text:style-name="T4">DICT wb SIZE anzahl</text:span></text:p>
                <text:p text:style-name="P3"><text:span text:style-name="T4">PRINT "Das Wörterbuch wb hat {anzahl} Einträge."</text:span></text:p>
                <text:p text:style-name="P3"><text:span text:style-name="T4">DICT wb DELETE</text:span></text:p>
                <text:p text:style-name="P4"><text:span text:style-name="T4"/></text:p>
                <text:p text:style-name="P4"><text:span text:style-name="T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ie Segmente dict_2 bis dict_4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6) Wörterbücher (Dictionarie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Unter anderem sind folgende weitere Operationen möglich:</text:span></text:p>
                <text:p text:style-name="P3"><text:span text:style-name="T4">DICT name LOOKUP … (einen Eintrag nachschlagen)</text:span></text:p>
                <text:p text:style-name="P3"><text:span text:style-name="T4">DICT name RECALL … (den n-ten Eintrag nachschlagen)</text:span></text:p>
                <text:p text:style-name="P3"><text:span text:style-name="T4">DICT name LOAD … (Sternvariablen/Dateien ins Wörterbuch laden)</text:span></text:p>
                <text:p text:style-name="P3"><text:span text:style-name="T4">DICT name UNLOAD … (Wörterbuch in Sternvariablen/Dateien schreiben)</text:span></text:p>
                <text:p text:style-name="P4"><text:span text:style-name="T4"/></text:p>
                <text:p text:style-name="P4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as Segment dict_2.</text:span></text:p>
          </draw:text-box>
        </draw:frame>
        <draw:frame presentation:style-name="pr3" draw:layer="layout" svg:width="26cm" svg:height="1.328cm" svg:x="1cm" svg:y="0.5cm" presentation:class="title">
          <draw:text-box>
            <text:p>6) Wörterbücher (Dictionarie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<text:span text:style-name="T4">Beispiel, Iterieren über ein Wörterbuch mit RECALL:</text:span></text:p>
                <text:p text:style-name="P3"><text:span text:style-name="T8">DICT wb CREATE 10</text:span></text:p>
                <text:p text:style-name="P3"><text:span text:style-name="T8">DICT wb LOAD/FILE "dateiname", "|"</text:span></text:p>
                <text:p text:style-name="P3"><text:span text:style-name="T8">DICT wb SIZE anzahl</text:span></text:p>
                <text:p text:style-name="P3"><text:span text:style-name="T8">LOOP n = 1, anzahl, 1</text:span></text:p>
                <text:p text:style-name="P3"><text:span text:style-name="T8"><text:s text:c="3"/>DICT wb RECALL key, n</text:span></text:p>
                <text:p text:style-name="P3"><text:span text:style-name="T8"><text:s text:c="3"/>PRINT </text:span><text:span text:style-name="T8">"{n}. Eintrag: {</text:span><text:span text:style-name="T8">key}"</text:span></text:p>
                <text:p text:style-name="P3"><text:span text:style-name="T8">ENDLOOP</text:span></text:p>
                <text:p text:style-name="P3"><text:span text:style-name="T8">DICT wb DELET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3T3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as Segment dict_3.</text:span></text:p>
          </draw:text-box>
        </draw:frame>
        <draw:frame presentation:style-name="pr7" draw:layer="layout" svg:width="26cm" svg:height="1.328cm" svg:x="1cm" svg:y="0.5cm" presentation:class="title">
          <draw:text-box>
            <text:p>6) Wörterbücher (Dictionaries)</text:p>
          </draw:text-box>
        </draw:frame>
        <draw:frame presentation:style-name="pr8" draw:layer="layout" svg:width="12.687cm" svg:height="10cm" svg:x="1cm" svg:y="3cm" presentation:class="outline">
          <draw:text-box>
            <text:list text:style-name="L3">
              <text:list-item>
                <text:p><text:span text:style-name="T2">Beispiel, Eintragen ins Wb.:</text:span></text:p>
                <text:p text:style-name="P4"><text:span text:style-name="T9">DICT wb CREATE 10</text:span></text:p>
                <text:p text:style-name="P4"><text:span text:style-name="T9">LOOP n = 1, 10, 1</text:span></text:p>
                <text:p text:style-name="P4"><text:span text:style-name="T9"><text:s text:c="3"/>w1 = n * 2</text:span></text:p>
                <text:p text:style-name="P4"><text:span text:style-name="T9"><text:s text:c="3"/>w2 = n + 2</text:span></text:p>
                <text:p text:style-name="P4"><text:span text:style-name="T9"><text:s text:c="3"/>DICT wb ADD n, num, cnt, w1, w2</text:span></text:p>
                <text:p text:style-name="P4"><text:span text:style-name="T9">ENDLOOP </text:span></text:p>
              </text:list-item>
            </text:list>
          </draw:text-box>
        </draw:frame>
        <draw:frame presentation:style-name="pr8" draw:layer="layout" svg:width="12.687cm" svg:height="10cm" svg:x="14.322cm" svg:y="3cm" presentation:class="outline">
          <draw:text-box>
            <text:list text:style-name="L3">
              <text:list-item>
                <text:p><text:span text:style-name="T2">Beispiel, Nachschlagen im Wb.:</text:span></text:p>
                <text:p text:style-name="P4"><text:span text:style-name="T9">LOOP key = 1, 10, 1</text:span></text:p>
                <text:p text:style-name="P4"><text:span text:style-name="T9"><text:s text:c="3"/>DICT wb LOOKUP key, num, cnt, <text:s text:c="5"/>w1, w2</text:span></text:p>
                <text:p text:style-name="P4"><text:span text:style-name="T9"><text:s text:c="3"/>PRINT "{num}. Eintrag: {key} - <text:s text:c="10"/>{w1} - {w2}"</text:span></text:p>
                <text:p text:style-name="P4"><text:span text:style-name="T9">ENDLOOP</text:span></text:p>
                <text:p text:style-name="P4"><text:span text:style-name="T9">DICT wb DELETE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_5f_Curve1" presentation:presentation-page-layout-name="AL2T1">
        <office:forms form:automatic-focus="false" form:apply-design-mode="false"/>
        <draw:frame draw:style-name="gr3" draw:text-style-name="P8" draw:layer="layout" svg:width="21cm" svg:height="0.961cm" svg:x="2cm" svg:y="14.5cm">
          <draw:text-box>
            <text:p><text:span text:style-name="T6">Vgl. in Segmentdatei vortrag das Segment dict_4.</text:span></text:p>
          </draw:text-box>
        </draw:frame>
        <draw:frame presentation:style-name="pr7" draw:layer="layout" svg:width="26cm" svg:height="1.328cm" svg:x="1cm" svg:y="0.5cm" presentation:class="title">
          <draw:text-box>
            <text:p>6) Wörterbücher (Dictionaries)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2">Beispiel, Wörterbuch in Sternvariable und Datei schreiben:</text:span></text:p>
                <text:p><text:span text:style-name="T5">DICT wb CREATE 1</text:span></text:p>
                <text:p><text:span text:style-name="T5">DICT wb ADD "test", num, count, "wert1", "wert2"</text:span></text:p>
                <text:p><text:span text:style-name="T5">DICT wb UNLOAD sternvar</text:span></text:p>
                <text:p><text:span text:style-name="T5">TRACE * sternvar</text:span></text:p>
                <text:p><text:span text:style-name="T5">SET status = CREATE ("dateiname", SEQ-E)</text:span></text:p>
                <text:p><text:span text:style-name="T5">DICT wb UNLOAD/FILE "dateiname", "|"</text:span></text:p>
                <text:p><text:span text:style-name="T5">DICT wb DELETE <text:s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de" fo:country="DE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1T17:29:12.372840600</meta:creation-date>
    <dc:description>This work is licensed under a Creative Commons 0 License.
It makes use of the works of kka_libo_design@ashisuto.co.jp.</dc:description>
    <meta:generator>LibreOffice/25.8.6.2$Windows_X86_64 LibreOffice_project/b4b39682cd9868fa725bc664aff94278d315bd04</meta:generator>
    <dc:title>Blue Curve</dc:title>
    <meta:editing-duration>PT1H36M13S</meta:editing-duration>
    <meta:editing-cycles>26</meta:editing-cycles>
    <meta:initial-creator>Christian Sonder</meta:initial-creator>
    <dc:date>2026-05-21T14:03:43.558971100</dc:date>
    <dc:creator>Christian Sonder</dc:creator>
    <meta:document-statistic meta:object-count="178"/>
  </office:meta>
</office:document-meta>
</file>